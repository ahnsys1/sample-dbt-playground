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paragraph-properties fo:margin-top="0in" fo:margin-bottom="0.1965in" style:contextual-spacing="false"/>
    </style:style>
    <style:style style:name="P4" style:family="paragraph" style:parent-style-name="Text_20_body" style:list-style-name="L3"/>
    <style:style style:name="P5" style:family="paragraph" style:parent-style-name="Text_20_body" style:list-style-name="L4"/>
    <style:style style:name="P6" style:family="paragraph" style:parent-style-name="Table_20_Heading">
      <style:paragraph-properties fo:text-align="left" style:justify-single-word="false"/>
    </style:style>
    <style:style style:name="P7" style:family="paragraph" style:parent-style-name="Table_20_Contents">
      <style:paragraph-properties fo:text-align="left" style:justify-single-word="false"/>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T1" style:family="text">
      <style:text-properties style:font-name="Liberation Mono"/>
    </style:style>
    <style:style style:name="T2" style:family="text">
      <style:text-properties fo:font-weight="bold"/>
    </style:style>
    <style:style style:name="T3" style:family="text">
      <style:text-properties style:font-name="Liberation Mono"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r: jaky je spravny postup pro nahravani dat do DBT? mam tim namysli jestli pouzit seed? <text:s/>akdyz ano tak raw tabulky se budou promazavat nebo se tam budou dalsi a dalsi zaznamy pridavat? <text:s/>a k cemu je incremental strategy merge?</text:p>
      <text:p text:style-name="Text_20_body">GitHub Copilot: Podívám se na konkrétní nastavení tohoto dbt projektu a na modely kolem <text:span text:style-name="T1">raw</text:span>/<text:span text:style-name="T1">bronze</text:span>, abych odpověď vztáhl přímo k vašemu workflow, ne jen k obecnému dbt. Ověřím hlavně, odkud se data načítají a zda už projekt používá incremental modely nebo snapshoty.</text:p>
      <text:p text:style-name="Text_20_body">Read memory </text:p>
      <text:p text:style-name="Text_20_body">Read </text:p>
      <text:p text:style-name="Text_20_body">Searched for files matching <text:span text:style-name="T1">sample-dbt-playground</text:span> · <text:span text:style-name="T1">product_sales/models/**/*.sql</text:span>, 23 matches</text:p>
      <text:p text:style-name="Text_20_body">Searched for regex <text:span text:style-name="T1">materialized|incremental|strategy|raw_|source\(</text:span> (<text:span text:style-name="T1">sample-dbt-playground</text:span> · <text:span text:style-name="T1">product_sales/**</text:span>), 37 results</text:p>
      <text:p text:style-name="Text_20_body">Z nastavení je už vidět důležitý detail: <text:span text:style-name="T1">raw_*</text:span> jsou v tomto projektu dbt seeds z CSV, zatímco <text:span text:style-name="T1">bronze_*</text:span> jsou incremental modely se strategií <text:span text:style-name="T1">merge</text:span>. Teď ještě ověřím konkrétní CSV/README a SQL jednotlivých vrstev, protože z toho plyne, zda je <text:span text:style-name="T1">raw</text:span> jen demo vstup, nebo má být skutečná historická landing vrstva.</text:p>
      <text:p text:style-name="Text_20_body">Read </text:p>
      <text:p text:style-name="Text_20_body">Read </text:p>
      <text:p text:style-name="Text_20_body">Read , lines 1 to 20</text:p>
      <text:p text:style-name="Text_20_body">Read </text:p>
      <text:p text:style-name="Text_20_body">V tomto projektu je současný postup:</text:p>
      <text:p text:style-name="Text_20_body"><text:span text:style-name="T1">CSV -&gt; dbt seed raw_* -&gt; incremental bronze_* -&gt; table silver_* -&gt; table gold_*</text:span></text:p>
      <text:p text:style-name="Text_20_body">Konkrétně:</text:p>
      <text:list text:style-name="L1">
        <text:list-item>
          <text:p text:style-name="P1"><text:span text:style-name="T1">seeds/raw_supplies.csv</text:span> se načte jako tabulka <text:span text:style-name="T1">raw_supplies</text:span>.</text:p>
        </text:list-item>
        <text:list-item>
          <text:p text:style-name="P1">bronze_supplies.sql čte z <text:span text:style-name="T1">raw_supplies</text:span>.</text:p>
        </text:list-item>
        <text:list-item>
          <text:p text:style-name="P1"><text:span text:style-name="T1">bronze_supplies</text:span> je nastavený jako <text:span text:style-name="T1">incremental</text:span> se strategií <text:span text:style-name="T1">merge</text:span>.</text:p>
        </text:list-item>
        <text:list-item>
          <text:p text:style-name="P1"><text:span text:style-name="T1">unique_key=['supply_id', 'product_sku']</text:span> určuje, podle čeho se řádky identifikují.</text:p>
        </text:list-item>
      </text:list>
      <text:p text:style-name="Text_20_body"><text:span text:style-name="T2">Kdy použít </text:span><text:span text:style-name="T3">seed</text:span></text:p>
      <text:p text:style-name="Text_20_body"><text:span text:style-name="T1">seed</text:span> je vhodný hlavně pro:</text:p>
      <text:list text:style-name="L2">
        <text:list-item>
          <text:p text:style-name="P2">malé statické nebo referenční tabulky,</text:p>
        </text:list-item>
        <text:list-item>
          <text:p text:style-name="P2"><text:soft-page-break/>testovací data,</text:p>
        </text:list-item>
        <text:list-item>
          <text:p text:style-name="P2">lookup tabulky,</text:p>
        </text:list-item>
        <text:list-item>
          <text:p text:style-name="P2">data, která jsou verzovaná společně s dbt projektem v Git repozitáři.</text:p>
        </text:list-item>
      </text:list>
      <text:p text:style-name="Text_20_body">Například:</text:p>
      <text:p text:style-name="P3">dbt seed --select raw_supplies<text:line-break/>dbt run --select bronze_supplies</text:p>
      <text:p text:style-name="Text_20_body">Seed není vhodný jako hlavní mechanismus pro pravidelný ingest produkčních dat. Pro produkci se obvykle používá externí ingestion nástroj, například Airbyte, Fivetran, Kafka, Debezium nebo vlastní ETL. Ten zapisuje data do raw databázových tabulek a dbt je potom transformuje pomocí <text:span text:style-name="T1">source()</text:span>.</text:p>
      <text:p text:style-name="Text_20_body"><text:span text:style-name="T2">Mažou se raw tabulky, nebo se přidávají další řádky?</text:span></text:p>
      <text:p text:style-name="Text_20_body">Seed se nechová jako append-only ingest. Tabulka se synchronizuje s obsahem CSV:</text:p>
      <text:list text:style-name="L3">
        <text:list-item>
          <text:p text:style-name="P4">řádek přidaný do CSV se objeví v tabulce,</text:p>
        </text:list-item>
        <text:list-item>
          <text:p text:style-name="P4">změněný řádek se aktualizuje,</text:p>
        </text:list-item>
        <text:list-item>
          <text:p text:style-name="P4">řádek odstraněný z CSV se po znovunačtení v tabulce také nemá nacházet.</text:p>
        </text:list-item>
      </text:list>
      <text:p text:style-name="Text_20_body">Technický způsob, jakým dbt tabulku obnoví, závisí na adapteru, ale z pohledu uživatele je důležité toto: <text:span text:style-name="T2">seed není historický log a automaticky do něj nepřidává další a další kopie dat při každém spuštění</text:span>.</text:p>
      <text:p text:style-name="Text_20_body">Pokud chcete raw historii, musí ji uchovávat upstream ingest nebo samostatná append-only tabulka. Alternativně lze pro sledování změn použít dbt snapshot, ale snapshot není totéž co seed.</text:p>
      <text:p text:style-name="Text_20_body"><text:span text:style-name="T2">Co dělá </text:span><text:span text:style-name="T3">incremental_strategy: merge</text:span></text:p>
      <text:p text:style-name="Text_20_body">Při prvním běhu se incremental model vytvoří celý. Při dalších bězích dbt porovnává nové řádky se stávající cílovou tabulkou podle <text:span text:style-name="T1">unique_key</text:span>.</text:p>
      <text:p text:style-name="Text_20_body">Zjednodušeně:</text:p>
      <text:p text:style-name="P3">pokud klíč existuje:<text:line-break/> <text:s text:c="3"/>UPDATE existujícího řádku<text:line-break/>pokud klíč neexistuje:<text:line-break/> <text:s text:c="3"/>INSERT nového řádku</text:p>
      <text:p text:style-name="Text_20_body">U vašeho modelu:</text:p>
      <text:p text:style-name="P3">{{ config(unique_key=['supply_id', 'product_sku']) }}</text:p>
      <text:p text:style-name="Text_20_body">je klíčem dvojice:</text:p>
      <text:p text:style-name="P3">supply_id + product_sku</text:p>
      <text:p text:style-name="Text_20_body">Například:</text:p>
      <text:p text:style-name="P3"><text:soft-page-break/>SUP-001 + JAF-001<text:line-break/>SUP-001 + JAF-002</text:p>
      <text:p text:style-name="Text_20_body">jsou dva různé záznamy.</text:p>
      <text:p text:style-name="Text_20_body"><text:span text:style-name="T1">merge</text:span> sám o sobě obvykle nemaže řádky, které už nejsou ve zdrojovém datasetu. Pokud tedy odstraníte řádek z CSV, může starý řádek v <text:span text:style-name="T1">bronze_supplies</text:span> zůstat. Pro synchronizaci včetně mazání je potřeba mazání explicitně řešit, například full refresh, delete logicí, snapshotem nebo upstream CDC.</text:p>
      <text:p text:style-name="Text_20_body"><text:span text:style-name="T2">Důležitý detail ve vašem modelu</text:span></text:p>
      <text:p text:style-name="Text_20_body">Současný SQL model:</text:p>
      <text:p text:style-name="P3">select<text:line-break/> <text:s text:c="3"/>...<text:line-break/> <text:s text:c="3"/>current_timestamp as bronze_loaded_at<text:line-break/>from {{ ref('raw_supplies') }}</text:p>
      <text:p text:style-name="Text_20_body">nemá podmínku <text:span text:style-name="T1">is_incremental()</text:span>. To znamená, že při každém běhu znovu načte všechny řádky z <text:span text:style-name="T1">raw_supplies</text:span> a <text:span text:style-name="T1">merge</text:span> je porovná s cílovou tabulkou. Výsledek bude funkčně správný, ale u velkých tabulek to nebude efektivní.</text:p>
      <text:p text:style-name="Text_20_body">Typický incremental model by měl filtrovat pouze nové nebo změněné záznamy, například:</text:p>
      <text:p text:style-name="P3">select<text:line-break/> <text:s text:c="3"/>...<text:line-break/>from {{ ref('raw_supplies') }}<text:line-break/><text:line-break/>{% if is_incremental() %}<text:line-break/>where updated_at &gt; (<text:line-break/> <text:s text:c="3"/>select coalesce(max(updated_at), '1900-01-01')<text:line-break/> <text:s text:c="3"/>from {{ this }}<text:line-break/>)<text:line-break/>{% endif %}</text:p>
      <text:p text:style-name="Text_20_body">To ale vyžaduje, aby zdrojová data měla například <text:span text:style-name="T1">updated_at</text:span>, CDC timestamp nebo jiné pole umožňující určit novější záznamy.</text:p>
      <text:p text:style-name="Text_20_body"><text:span text:style-name="T2">Doporučený postup</text:span></text:p>
      <text:p text:style-name="Text_20_body">Pro tento demo projekt je <text:span text:style-name="T1">seed</text:span> v pořádku:</text:p>
      <text:p text:style-name="P3">CSV<text:line-break/> <text:s/>-&gt; dbt seed<text:line-break/> <text:s/>-&gt; raw_* tabulka<text:line-break/> <text:s/>-&gt; bronze incremental merge<text:line-break/> <text:s/>-&gt; silver/gold tabulky</text:p>
      <text:p text:style-name="Text_20_body">Pro reálnou produkční pipeline bych doporučil:</text:p>
      <text:p text:style-name="P3">zdrojový systém<text:line-break/> <text:s/>-&gt; ingestion/CDC nástroj<text:line-break/> <text:s/>-&gt; raw tabulky<text:line-break/> <text:s/>-&gt; dbt source()<text:line-break/><text:soft-page-break/> <text:s/>-&gt; bronze incremental merge<text:line-break/> <text:s/>-&gt; silver<text:line-break/> <text:s/>-&gt; gold</text:p>
      <text:p text:style-name="Text_20_body">Ve vašem repozitáři už existuje i Debezium/Kafka Connect část. Ta je vhodnější pro průběžné <text:span text:style-name="T1">INSERT</text:span>, <text:span text:style-name="T1">UPDATE</text:span> a <text:span text:style-name="T1">DELETE</text:span> změny než seed z CSV. Db­t by v takovém případě neměl raw data nahrávat, ale pouze je transformovat.</text:p>
      <text:p text:style-name="Text_20_body">User: Co je to CDC nástroj? Co je dbt source()?</text:p>
      <text:p text:style-name="Text_20_body">GitHub Copilot: <text:span text:style-name="T2">CDC nástroj</text:span></text:p>
      <text:p text:style-name="Text_20_body">CDC znamená <text:span text:style-name="T2">Change Data Capture</text:span>, tedy zachytávání změn ve zdrojové databázi.</text:p>
      <text:p text:style-name="Text_20_body">CDC nástroj průběžně sleduje databázi a posílá události například:</text:p>
      <text:p text:style-name="P3">INSERT: nový zákazník<text:line-break/>UPDATE: změněná cena produktu<text:line-break/>DELETE: odstraněný obchod</text:p>
      <text:p text:style-name="Text_20_body">Místo opakovaného načítání celé tabulky tedy přenáší pouze změny.</text:p>
      <text:p text:style-name="Text_20_body">Ve vašem projektu tuto roli plní <text:span text:style-name="T2">Debezium</text:span>:</text:p>
      <text:p text:style-name="P3">PostgreSQL source<text:line-break/> <text:s text:c="3"/>-&gt; Debezium<text:line-break/> <text:s text:c="3"/>-&gt; Kafka<text:line-break/> <text:s text:c="3"/>-&gt; Kafka Connect JDBC sink<text:line-break/> <text:s text:c="3"/>-&gt; PostgreSQL raw/bronze tabulky<text:line-break/> <text:s text:c="3"/>-&gt; dbt<text:line-break/> <text:s text:c="3"/>-&gt; silver/gold modely</text:p>
      <text:p text:style-name="Text_20_body">Například když v PostgreSQL změníte cenu produktu:</text:p>
      <text:p text:style-name="P3">update products<text:line-break/>set price = 120<text:line-break/>where sku = 'JAF-001';</text:p>
      <text:p text:style-name="Text_20_body">Debezium tuto změnu zachytí a odešle ji přes Kafka. Sink konektor pak aktualizuje odpovídající řádek v cílové databázi. Db­t následně pracuje s aktualizovanými daty.</text:p>
      <text:p text:style-name="Text_20_body">CDC je užitečné, když:</text:p>
      <text:list text:style-name="L4">
        <text:list-item>
          <text:p text:style-name="P5">data přibývají nebo se mění průběžně,</text:p>
        </text:list-item>
        <text:list-item>
          <text:p text:style-name="P5">potřebujete zachytit i <text:span text:style-name="T1">UPDATE</text:span> a <text:span text:style-name="T1">DELETE</text:span>,</text:p>
        </text:list-item>
        <text:list-item>
          <text:p text:style-name="P5">tabulky jsou příliš velké na pravidelné full loady,</text:p>
        </text:list-item>
        <text:list-item>
          <text:p text:style-name="P5">potřebujete nízkou prodlevu mezi zdrojem a analytickou databází.</text:p>
        </text:list-item>
      </text:list>
      <text:p text:style-name="Text_20_body">Seed z CSV oproti tomu není CDC. Db­t při <text:span text:style-name="T1">dbt seed</text:span> pouze synchronizuje CSV s tabulkou. Neví, že se mezitím změnil konkrétní řádek, a neposílá změnové události.</text:p>
      <text:p text:style-name="Text_20_body"><text:span text:style-name="T2">Co je </text:span><text:span text:style-name="T3">source()</text:span><text:span text:style-name="T2"> v dbt</text:span></text:p>
      <text:p text:style-name="Text_20_body"><text:soft-page-break/><text:span text:style-name="T1">source()</text:span> je dbt funkce pro odkaz na tabulku, kterou <text:span text:style-name="T2">nevytvořil dbt</text:span>, ale nějaký externí systém nebo ingestion proces.</text:p>
      <text:p text:style-name="Text_20_body">Příklad:</text:p>
      <text:p text:style-name="P3">select *<text:line-break/>from {{ source('sales', 'orders') }}</text:p>
      <text:p text:style-name="Text_20_body">To může odkazovat například na tabulku:</text:p>
      <text:p text:style-name="P3">raw.sales_orders</text:p>
      <text:p text:style-name="Text_20_body">Konfigurace bývá v souboru <text:span text:style-name="T1">sources.yml</text:span>:</text:p>
      <text:p text:style-name="P3">version: 2<text:line-break/><text:line-break/>sources:<text:line-break/> <text:s/>- name: sales<text:line-break/> <text:s text:c="3"/>database: postgres<text:line-break/> <text:s text:c="3"/>schema: raw<text:line-break/> <text:s text:c="3"/>tables:<text:line-break/> <text:s text:c="5"/>- name: orders<text:line-break/> <text:s text:c="5"/>- name: customers</text:p>
      <text:p text:style-name="Text_20_body">Dbt potom zná přesný název zdrojové tabulky a může na ní provádět testy a kontrolovat čerstvost dat.</text:p>
      <text:p text:style-name="Text_20_body"><text:span text:style-name="T2">Rozdíl mezi </text:span><text:span text:style-name="T3">source()</text:span><text:span text:style-name="T2"> a </text:span><text:span text:style-name="T3">ref()</text:span></text:p>
      <text:p text:style-name="Text_20_body">Ve vašem projektu se používá například:</text:p>
      <text:p text:style-name="P3">from {{ ref('raw_supplies') }}</text:p>
      <text:p text:style-name="Text_20_body"><text:span text:style-name="T1">ref()</text:span> znamená:</text:p>
      <text:p text:style-name="Quotations">Odkazuji na jiný dbt model nebo seed.</text:p>
      <text:p text:style-name="Text_20_body">Proto <text:span text:style-name="T1">raw_supplies</text:span> v současném projektu funguje jako seed z:</text:p>
      <text:p text:style-name="P3">seeds/raw_supplies.csv</text:p>
      <text:p text:style-name="Text_20_body">Při produkčním CDC workflow by místo toho bylo typické:</text:p>
      <text:p text:style-name="P3">from {{ source('raw', 'supplies') }}</text:p>
      <text:p text:style-name="Text_20_body">Rozdíl:</text:p>
      <table:table table:name="Table1" table:style-name="Table1">
        <table:table-column table:style-name="Table1.A" table:number-columns-repeated="3"/>
        <table:table-header-rows>
          <table:table-row>
            <table:table-cell table:style-name="Table1.A1" office:value-type="string">
              <text:p text:style-name="P6">Funkce</text:p>
            </table:table-cell>
            <table:table-cell table:style-name="Table1.A1" office:value-type="string">
              <text:p text:style-name="P6">Odkazuje na</text:p>
            </table:table-cell>
            <table:table-cell table:style-name="Table1.C1" office:value-type="string">
              <text:p text:style-name="P6">Typický původ</text:p>
            </table:table-cell>
          </table:table-row>
        </table:table-header-rows>
        <table:table-row>
          <table:table-cell table:style-name="Table1.A2" office:value-type="string">
            <text:p text:style-name="Table_20_Contents"><text:span text:style-name="T1">ref()</text:span></text:p>
          </table:table-cell>
          <table:table-cell table:style-name="Table1.A2" office:value-type="string">
            <text:p text:style-name="P7">jiný dbt model nebo seed</text:p>
          </table:table-cell>
          <table:table-cell table:style-name="Table1.C2" office:value-type="string">
            <text:p text:style-name="P7">dbt</text:p>
          </table:table-cell>
        </table:table-row>
        <table:table-row>
          <table:table-cell table:style-name="Table1.A2" office:value-type="string">
            <text:p text:style-name="Table_20_Contents"><text:span text:style-name="T1">source()</text:span></text:p>
          </table:table-cell>
          <table:table-cell table:style-name="Table1.A2" office:value-type="string">
            <text:p text:style-name="P7">externí zdrojovou tabulku</text:p>
          </table:table-cell>
          <table:table-cell table:style-name="Table1.C2" office:value-type="string">
            <text:p text:style-name="P7">CDC, ETL, aplikace, datový sklad</text:p>
          </table:table-cell>
        </table:table-row>
      </table:table>
      <text:p text:style-name="Text_20_body"/>
      <text:p text:style-name="Text_20_body"><text:soft-page-break/><text:span text:style-name="T1">ref()</text:span> zároveň dbt vytvoří závislost mezi modely. Db­t díky tomu ví, v jakém pořadí má modely spouštět.</text:p>
      <text:p text:style-name="Text_20_body">Například:</text:p>
      <text:p text:style-name="P3">raw_supplies seed<text:line-break/> <text:s text:c="3"/>-&gt; bronze_supplies<text:line-break/> <text:s text:c="3"/>-&gt; silver_supplies<text:line-break/> <text:s text:c="3"/>-&gt; dim_supplies</text:p>
      <text:p text:style-name="Text_20_body"><text:span text:style-name="T1">source()</text:span> zase označuje vstupní hranici dbt projektu:</text:p>
      <text:p text:style-name="P3">Debezium/Kafka/ETL<text:line-break/> <text:s text:c="3"/>-&gt; raw.supplies<text:line-break/> <text:s text:c="3"/>-&gt; {{ source('raw', 'supplies') }}<text:line-break/> <text:s text:c="3"/>-&gt; bronze_supplies</text:p>
      <text:p text:style-name="Text_20_body">Prakticky tedy:</text:p>
      <text:list text:style-name="L5">
        <text:list-item>
          <text:p text:style-name="P8">pro váš současný demo projekt: <text:span text:style-name="T1">ref('raw_supplies')</text:span> je správně,</text:p>
        </text:list-item>
        <text:list-item>
          <text:p text:style-name="P8">pro produkční tabulky plněné Debezium nebo jiným ingestion nástrojem: použil bych <text:span text:style-name="T1">source('raw', 'supplies')</text:span>,</text:p>
        </text:list-item>
        <text:list-item>
          <text:p text:style-name="P8"><text:span text:style-name="T1">source()</text:span> sám data nenačítá; pouze dbt říká, kde externí data najde.</text:p>
        </text:list-item>
      </text:list>
      <text:p text:style-name="Text_20_body">User: jak mam nahrat vsechny data do cilovych tabulek pred spustenim dbt ru. Hlavne kde je mam nahrat? A taky zda je mam nahrat do raw tabulek nebo do bronze? nebo jak je to spravne?</text:p>
      <text:p text:style-name="Text_20_body">GitHub Copilot: Zkontroluji ještě konkrétní konektorovou konfiguraci v projektu, protože zde jsou dvě možné databáze a názvy <text:span text:style-name="T1">raw</text:span>/<text:span text:style-name="T1">bronze</text:span> se mohou snadno zaměnit. Pak popíšu přesný pořadník příkazů pro váš současný seed workflow i pro CDC variantu.</text:p>
      <text:p text:style-name="Text_20_body">Searched for files matching <text:span text:style-name="T1">sample-dbt-playground</text:span> · <text:span text:style-name="T1">product_sales_connector/connectors/*.json</text:span>, 7 matches</text:p>
      <text:p text:style-name="Text_20_body">Read </text:p>
      <text:p text:style-name="Text_20_body">Read </text:p>
      <text:p text:style-name="Text_20_body">Read , lines 1 to 100</text:p>
      <text:p text:style-name="Text_20_body">V tomto projektu jsou dvě možné varianty. Pro začátek doporučuji použít tu první, protože odpovídá současnému nastavení dbt.</text:p>
      <text:h text:style-name="Heading_20_2" text:outline-level="2">Varianta 1: Data jsou v CSV souborech</text:h>
      <text:p text:style-name="Text_20_body">V současném projektu jsou vstupní data zde:</text:p>
      <text:p text:style-name="P3">product_sales/seeds/raw_*.csv</text:p>
      <text:p text:style-name="Text_20_body">Například:</text:p>
      <text:p text:style-name="P3"><text:soft-page-break/>product_sales/seeds/raw_supplies.csv<text:line-break/>product_sales/seeds/raw_products.csv<text:line-break/>product_sales/seeds/raw_orders.csv</text:p>
      <text:p text:style-name="Text_20_body">Data tedy nahrajete nebo vložíte do těchto CSV souborů. <text:span text:style-name="T2">Nenahráváte je přímo do </text:span><text:span text:style-name="T3">bronze</text:span><text:span text:style-name="T2"> tabulek.</text:span></text:p>
      <text:p text:style-name="Text_20_body">Potom spusťte z adresáře product_sales:</text:p>
      <text:p text:style-name="P3">dbt seed<text:line-break/>dbt run</text:p>
      <text:p text:style-name="Text_20_body">Nebo vše najednou:</text:p>
      <text:p text:style-name="P3">dbt build</text:p>
      <text:p text:style-name="Text_20_body">Výsledek bude přibližně:</text:p>
      <text:p text:style-name="P3">raw_supplies <text:s text:c="6"/>&lt;- vytvoří dbt seed z raw_supplies.csv<text:line-break/>bronze_supplies <text:s text:c="3"/>&lt;- vytvoří nebo aktualizuje dbt model<text:line-break/>silver_supplies <text:s text:c="3"/>&lt;- vytvoří dbt model<text:line-break/>dim_supplies <text:s text:c="6"/>&lt;- vytvoří dbt model</text:p>
      <text:p text:style-name="Text_20_body">Přesněji:</text:p>
      <text:p text:style-name="P3">CSV soubor<text:line-break/> <text:s text:c="3"/>-&gt; raw tabulka<text:line-break/> <text:s text:c="3"/>-&gt; bronze tabulka<text:line-break/> <text:s text:c="3"/>-&gt; silver tabulka<text:line-break/> <text:s text:c="3"/>-&gt; gold tabulka</text:p>
      <text:h text:style-name="Heading_20_3" text:outline-level="3">Kam tedy nahrát data?</text:h>
      <table:table table:name="Table2" table:style-name="Table2">
        <table:table-column table:style-name="Table2.A" table:number-columns-repeated="3"/>
        <table:table-header-rows>
          <table:table-row>
            <table:table-cell table:style-name="Table2.A1" office:value-type="string">
              <text:p text:style-name="P6">Vrstva</text:p>
            </table:table-cell>
            <table:table-cell table:style-name="Table2.A1" office:value-type="string">
              <text:p text:style-name="P6">Kdo ji plní</text:p>
            </table:table-cell>
            <table:table-cell table:style-name="Table2.C1" office:value-type="string">
              <text:p text:style-name="P6">Co do ní patří</text:p>
            </table:table-cell>
          </table:table-row>
        </table:table-header-rows>
        <table:table-row>
          <table:table-cell table:style-name="Table2.A2" office:value-type="string">
            <text:p text:style-name="Table_20_Contents"><text:span text:style-name="T1">raw</text:span></text:p>
          </table:table-cell>
          <table:table-cell table:style-name="Table2.A2" office:value-type="string">
            <text:p text:style-name="P7">seed nebo ingestion nástroj</text:p>
          </table:table-cell>
          <table:table-cell table:style-name="Table2.C2" office:value-type="string">
            <text:p text:style-name="P7">původní data bez větších úprav</text:p>
          </table:table-cell>
        </table:table-row>
        <table:table-row>
          <table:table-cell table:style-name="Table2.A2" office:value-type="string">
            <text:p text:style-name="Table_20_Contents"><text:span text:style-name="T1">bronze</text:span></text:p>
          </table:table-cell>
          <table:table-cell table:style-name="Table2.A2" office:value-type="string">
            <text:p text:style-name="P7">dbt</text:p>
          </table:table-cell>
          <table:table-cell table:style-name="Table2.C2" office:value-type="string">
            <text:p text:style-name="P7">lehce očištěná a typovaná data</text:p>
          </table:table-cell>
        </table:table-row>
        <table:table-row>
          <table:table-cell table:style-name="Table2.A2" office:value-type="string">
            <text:p text:style-name="Table_20_Contents"><text:span text:style-name="T1">silver</text:span></text:p>
          </table:table-cell>
          <table:table-cell table:style-name="Table2.A2" office:value-type="string">
            <text:p text:style-name="P7">dbt</text:p>
          </table:table-cell>
          <table:table-cell table:style-name="Table2.C2" office:value-type="string">
            <text:p text:style-name="P7">transformovaná a obohacená data</text:p>
          </table:table-cell>
        </table:table-row>
        <table:table-row>
          <table:table-cell table:style-name="Table2.A2" office:value-type="string">
            <text:p text:style-name="Table_20_Contents"><text:span text:style-name="T1">gold</text:span></text:p>
          </table:table-cell>
          <table:table-cell table:style-name="Table2.A2" office:value-type="string">
            <text:p text:style-name="P7">dbt</text:p>
          </table:table-cell>
          <table:table-cell table:style-name="Table2.C2" office:value-type="string">
            <text:p text:style-name="P7">reportingové tabulky a dimenze/fakta</text:p>
          </table:table-cell>
        </table:table-row>
      </table:table>
      <text:p text:style-name="Text_20_body"/>
      <text:p text:style-name="Text_20_body">Do <text:span text:style-name="T1">bronze</text:span> ručně nevkládejte data. V tomto projektu je <text:span text:style-name="T1">bronze</text:span> dbt model:</text:p>
      <text:p text:style-name="P3">from {{ ref('raw_supplies') }}</text:p>
      <text:p text:style-name="Text_20_body">Dbt ho vytváří podle SQL definice v souboru bronze_supplies.sql.</text:p>
      <text:h text:style-name="Heading_20_2" text:outline-level="2">Varianta 2: Data přicházejí z aplikace nebo jiné databáze</text:h>
      <text:p text:style-name="Text_20_body">V produkčním řešení by aplikace zapisovala do zdrojové databáze, například:</text:p>
      <text:p text:style-name="P3"><text:soft-page-break/>aplikace<text:line-break/> <text:s text:c="3"/>-&gt; PostgreSQL source<text:line-break/> <text:s text:c="3"/>-&gt; CDC/ETL nástroj<text:line-break/> <text:s text:c="3"/>-&gt; raw tabulky<text:line-break/> <text:s text:c="3"/>-&gt; dbt<text:line-break/> <text:s text:c="3"/>-&gt; bronze/silver/gold</text:p>
      <text:p text:style-name="Text_20_body">V takovém případě se data nenahrávají do CSV ani přímo do bronze. Ingestion nástroj je zapíše do <text:span text:style-name="T1">raw</text:span> tabulek. Db­t je potom načte přes:</text:p>
      <text:p text:style-name="P3">from {{ source('raw', 'supplies') }}</text:p>
      <text:p text:style-name="Text_20_body">Konfigurace by mohla vypadat takto:</text:p>
      <text:p text:style-name="P3">version: 2<text:line-break/><text:line-break/>sources:<text:line-break/> <text:s/>- name: raw<text:line-break/> <text:s text:c="3"/>schema: raw<text:line-break/> <text:s text:c="3"/>tables:<text:line-break/> <text:s text:c="5"/>- name: supplies<text:line-break/> <text:s text:c="5"/>- name: products<text:line-break/> <text:s text:c="5"/>- name: orders</text:p>
      <text:p text:style-name="Text_20_body">A bronze model:</text:p>
      <text:p text:style-name="P3">select<text:line-break/> <text:s text:c="3"/>cast(id as varchar) as supply_id,<text:line-break/> <text:s text:c="3"/>cast(name as varchar) as supply_name,<text:line-break/> <text:s text:c="3"/>cast(cost as numeric) as cost,<text:line-break/> <text:s text:c="3"/>cast(perishable as boolean) as is_perishable,<text:line-break/> <text:s text:c="3"/>cast(sku as varchar) as product_sku,<text:line-break/> <text:s text:c="3"/>current_timestamp as bronze_loaded_at<text:line-break/>from {{ source('raw', 'supplies') }}</text:p>
      <text:h text:style-name="Heading_20_2" text:outline-level="2">Jak to souvisí s vaším Debezium konektorem?</text:h>
      <text:p text:style-name="Text_20_body">Ve vašem repozitáři je trochu specifické zapojení:</text:p>
      <text:p text:style-name="P3">dbt vytvoří bronze tabulky v source PostgreSQL<text:line-break/> <text:s text:c="3"/>-&gt; Debezium zachytí jejich změny<text:line-break/> <text:s text:c="3"/>-&gt; Kafka<text:line-break/> <text:s text:c="3"/>-&gt; JDBC sink<text:line-break/> <text:s text:c="3"/>-&gt; target PostgreSQL</text:p>
      <text:p text:style-name="Text_20_body">Podle konfigurace se Debezium připojuje ke zdrojové PostgreSQL na portu <text:span text:style-name="T1">5431</text:span> a kopíruje tabulky <text:span text:style-name="T1">product_sales_bronze.bronze_*</text:span> do cílové PostgreSQL na portu <text:span text:style-name="T1">5432</text:span>.</text:p>
      <text:p text:style-name="Text_20_body">Pro první naplnění tedy postup v tomto projektu vypadá takto:</text:p>
      <text:p text:style-name="P3">cd /home/jan/Desktop/sample-dbt-playground/product_sales<text:line-break/><text:line-break/>dbt seed<text:line-break/>dbt run</text:p>
      <text:p text:style-name="Text_20_body"><text:soft-page-break/>Tím vzniknou a naplní se <text:span text:style-name="T1">raw_*</text:span> a <text:span text:style-name="T1">bronze_*</text:span> tabulky ve zdrojové databázi. Poté Debezium při <text:span text:style-name="T1">snapshot.mode=initial</text:span> provede počáteční snapshot bronze tabulek do cílové databáze.</text:p>
      <text:p text:style-name="Text_20_body">Následně:</text:p>
      <text:p text:style-name="P3">nový nebo změněný řádek<text:line-break/> <text:s text:c="3"/>-&gt; dbt aktualizuje bronze<text:line-break/> <text:s text:c="3"/>-&gt; Debezium zachytí změnu<text:line-break/> <text:s text:c="3"/>-&gt; Kafka<text:line-break/> <text:s text:c="3"/>-&gt; cílová databáze</text:p>
      <text:h text:style-name="Heading_20_2" text:outline-level="2">Co bych doporučil pro váš případ</text:h>
      <text:p text:style-name="Text_20_body">Pro aktuální demo:</text:p>
      <text:list text:style-name="L6">
        <text:list-item>
          <text:p text:style-name="P9">Vložte kompletní data do <text:span text:style-name="T1">product_sales/seeds/raw_*.csv</text:span>.</text:p>
        </text:list-item>
        <text:list-item>
          <text:p text:style-name="P9">Zkontrolujte, že CSV neobsahují duplicitní klíče.</text:p>
        </text:list-item>
        <text:list-item>
          <text:p text:style-name="P9">Spusťte:</text:p>
        </text:list-item>
      </text:list>
      <text:p text:style-name="P3">dbt seed<text:line-break/>dbt build</text:p>
      <text:list text:style-name="L7">
        <text:list-item>
          <text:p text:style-name="P10">Teprve potom spusťte nebo zaregistrujte Debezium/Kafka Connect konektory.</text:p>
        </text:list-item>
      </text:list>
      <text:p text:style-name="Text_20_body">Pro produkční řešení:</text:p>
      <text:p text:style-name="P3">aplikace/zdrojová DB<text:line-break/> <text:s text:c="3"/>-&gt; CDC nebo ETL<text:line-break/> <text:s text:c="3"/>-&gt; raw tabulky<text:line-break/> <text:s text:c="3"/>-&gt; dbt source()<text:line-break/> <text:s text:c="3"/>-&gt; bronze<text:line-break/> <text:s text:c="3"/>-&gt; silver<text:line-break/> <text:s text:c="3"/>-&gt; gold</text:p>
      <text:p text:style-name="Text_20_body">Nejdůležitější pravidlo je:</text:p>
      <text:p text:style-name="Quotations">Data se načítají do <text:span text:style-name="T1">raw</text:span>; <text:span text:style-name="T1">bronze</text:span>, <text:span text:style-name="T1">silver</text:span> a <text:span text:style-name="T1">gold</text:span> vytváří dbt.</text:p>
      <text:p text:style-name="Text_20_body">User: ma existovat jeste raw vrstva v DBT nebo staci pouzit bronze vrstvu pro surova data?</text:p>
      <text:p text:style-name="Text_20_body">GitHub Copilot: Ano, <text:span text:style-name="T1">raw</text:span> vrstva může existovat mimo dbt. Db­t ji nemusí vytvářet ani plnit.</text:p>
      <text:p text:style-name="Text_20_body">Správné zapojení bývá:</text:p>
      <text:p text:style-name="P3">zdrojová aplikace / databáze / CDC<text:line-break/> <text:s text:c="3"/>-&gt; raw tabulky<text:line-break/> <text:s text:c="3"/>-&gt; dbt bronze<text:line-break/> <text:s text:c="3"/>-&gt; dbt silver<text:line-break/> <text:s text:c="3"/>-&gt; dbt gold</text:p>
      <text:h text:style-name="Heading_20_2" text:outline-level="2"><text:soft-page-break/>Co je <text:span text:style-name="T1">raw</text:span> a co <text:span text:style-name="T1">bronze</text:span></text:h>
      <text:h text:style-name="Heading_20_3" text:outline-level="3">Raw</text:h>
      <text:p text:style-name="Text_20_body"><text:span text:style-name="T1">raw</text:span> obsahuje data co nejblíže původnímu zdroji:</text:p>
      <text:list text:style-name="L8">
        <text:list-item>
          <text:p text:style-name="P11">minimální nebo žádné transformace,</text:p>
        </text:list-item>
        <text:list-item>
          <text:p text:style-name="P11">původní názvy a hodnoty,</text:p>
        </text:list-item>
        <text:list-item>
          <text:p text:style-name="P11">často metadata o načtení,</text:p>
        </text:list-item>
        <text:list-item>
          <text:p text:style-name="P11">případně technické informace z CDC,</text:p>
        </text:list-item>
        <text:list-item>
          <text:p text:style-name="P11">slouží jako auditovatelná vstupní vrstva.</text:p>
        </text:list-item>
      </text:list>
      <text:p text:style-name="Text_20_body">Dbt na raw tabulky pouze odkazuje:</text:p>
      <text:p text:style-name="P3">from {{ source('raw', 'customers') }}</text:p>
      <text:p text:style-name="Text_20_body">Raw tabulky může plnit například:</text:p>
      <text:list text:style-name="L9">
        <text:list-item>
          <text:p text:style-name="P12">aplikace,</text:p>
        </text:list-item>
        <text:list-item>
          <text:p text:style-name="P12">Airbyte,</text:p>
        </text:list-item>
        <text:list-item>
          <text:p text:style-name="P12">Fivetran,</text:p>
        </text:list-item>
        <text:list-item>
          <text:p text:style-name="P12">Debezium,</text:p>
        </text:list-item>
        <text:list-item>
          <text:p text:style-name="P12">Kafka Connect,</text:p>
        </text:list-item>
        <text:list-item>
          <text:p text:style-name="P12">vlastní ETL skript,</text:p>
        </text:list-item>
        <text:list-item>
          <text:p text:style-name="P12">dbt seed u malých statických dat.</text:p>
        </text:list-item>
      </text:list>
      <text:h text:style-name="Heading_20_3" text:outline-level="3" text:is-list-header="true">Bronze</text:h>
      <text:p text:style-name="Text_20_body"><text:span text:style-name="T1">bronze</text:span> už je dbt model. Z raw dat typicky provádí:</text:p>
      <text:list text:style-name="L10">
        <text:list-item>
          <text:p text:style-name="P13">přetypování sloupců,</text:p>
        </text:list-item>
        <text:list-item>
          <text:p text:style-name="P13">sjednocení názvů,</text:p>
        </text:list-item>
        <text:list-item>
          <text:p text:style-name="P13">základní čištění,</text:p>
        </text:list-item>
        <text:list-item>
          <text:p text:style-name="P13">odstranění technického šumu,</text:p>
        </text:list-item>
        <text:list-item>
          <text:p text:style-name="P13">případně deduplikaci,</text:p>
        </text:list-item>
        <text:list-item>
          <text:p text:style-name="P13">zpracování incremental logiky.</text:p>
        </text:list-item>
      </text:list>
      <text:p text:style-name="Text_20_body">Například váš model:</text:p>
      <text:p text:style-name="P3">select<text:line-break/> <text:s text:c="3"/>cast(id as varchar) as supply_id,<text:line-break/> <text:s text:c="3"/>cast(name as varchar) as supply_name,<text:line-break/><text:soft-page-break/> <text:s text:c="3"/>cast(cost as numeric) as cost,<text:line-break/> <text:s text:c="3"/>cast(perishable as boolean) as is_perishable,<text:line-break/> <text:s text:c="3"/>cast(sku as varchar) as product_sku,<text:line-break/> <text:s text:c="3"/>current_timestamp as bronze_loaded_at<text:line-break/>from {{ ref('raw_supplies') }}</text:p>
      <text:p text:style-name="Text_20_body">je typický bronze model, protože data přetypovává a přidává technický sloupec.</text:p>
      <text:h text:style-name="Heading_20_2" text:outline-level="2">Musí raw existovat?</text:h>
      <text:p text:style-name="Text_20_body">Nemusí. Záleží na typu projektu.</text:p>
      <text:h text:style-name="Heading_20_3" text:outline-level="3">Doporučené: raw i bronze</text:h>
      <text:p text:style-name="Text_20_body">Použijte obě vrstvy, když:</text:p>
      <text:list text:style-name="L11">
        <text:list-item>
          <text:p text:style-name="P14">data přicházejí z produkčních systémů,</text:p>
        </text:list-item>
        <text:list-item>
          <text:p text:style-name="P14">potřebujete možnost znovu přepočítat bronze,</text:p>
        </text:list-item>
        <text:list-item>
          <text:p text:style-name="P14">řešíte audit nebo debugging,</text:p>
        </text:list-item>
        <text:list-item>
          <text:p text:style-name="P14">data se mění pomocí CDC,</text:p>
        </text:list-item>
        <text:list-item>
          <text:p text:style-name="P14">chcete oddělit ingest od transformační logiky,</text:p>
        </text:list-item>
        <text:list-item>
          <text:p text:style-name="P14">potřebujete uchovat původní podobu dat.</text:p>
        </text:list-item>
      </text:list>
      <text:p text:style-name="Text_20_body">V produkci je to obvykle bezpečnější a přehlednější varianta.</text:p>
      <text:h text:style-name="Heading_20_3" text:outline-level="3">Lze použít pouze bronze</text:h>
      <text:p text:style-name="Text_20_body">Raw vrstvu můžete vynechat, pokud:</text:p>
      <text:list text:style-name="L12">
        <text:list-item>
          <text:p text:style-name="P15">jde o malý projekt,</text:p>
        </text:list-item>
        <text:list-item>
          <text:p text:style-name="P15">zdrojová tabulka je stabilní,</text:p>
        </text:list-item>
        <text:list-item>
          <text:p text:style-name="P15">nepotřebujete uchovávat původní podobu dat,</text:p>
        </text:list-item>
        <text:list-item>
          <text:p text:style-name="P15">máte jednoduchý import,</text:p>
        </text:list-item>
        <text:list-item>
          <text:p text:style-name="P15">jde pouze o prototyp nebo školní demo.</text:p>
        </text:list-item>
      </text:list>
      <text:p text:style-name="Text_20_body">Pak by ingestion nástroj zapisoval přímo do tabulky, kterou dbt používá jako bronze vstup. Tím ale vzniká nejasnost: pokud do stejné tabulky zapisuje ingestion nástroj a zároveň ji spravuje dbt, mohou si navzájem přepisovat data.</text:p>
      <text:p text:style-name="Text_20_body">Proto nedoporučuji, aby byla jedna tabulka zároveň:</text:p>
      <text:list text:style-name="L13">
        <text:list-item>
          <text:p text:style-name="P16">cílem ingestion procesu,</text:p>
        </text:list-item>
        <text:list-item>
          <text:p text:style-name="P16">a výsledkem dbt modelu.</text:p>
        </text:list-item>
      </text:list>
      <text:h text:style-name="Heading_20_2" text:outline-level="2" text:is-list-header="true"><text:soft-page-break/>Co je správně pro váš projekt?</text:h>
      <text:p text:style-name="Text_20_body">V současném projektu máte:</text:p>
      <text:p text:style-name="P3">seeds/raw_*.csv<text:line-break/> <text:s text:c="3"/>-&gt; raw_* tabulky<text:line-break/> <text:s text:c="3"/>-&gt; bronze_* dbt modely<text:line-break/> <text:s text:c="3"/>-&gt; silver_* dbt modely<text:line-break/> <text:s text:c="3"/>-&gt; gold_* dbt modely</text:p>
      <text:p text:style-name="Text_20_body">To je pro demo v pořádku. <text:span text:style-name="T1">raw_*</text:span> jsou zde dbt seeds, protože vstupem jsou CSV soubory.</text:p>
      <text:p text:style-name="Text_20_body">Pro produkční variantu by bylo lepší:</text:p>
      <text:p text:style-name="P3">CDC/ETL<text:line-break/> <text:s text:c="3"/>-&gt; raw tabulky<text:line-break/> <text:s text:c="3"/>-&gt; bronze dbt modely<text:line-break/> <text:s text:c="3"/>-&gt; silver dbt modely<text:line-break/> <text:s text:c="3"/>-&gt; gold dbt modely</text:p>
      <text:p text:style-name="Text_20_body">Bronze model by pak používal <text:span text:style-name="T1">source()</text:span>:</text:p>
      <text:p text:style-name="P3">from {{ source('raw', 'supplies') }}</text:p>
      <text:p text:style-name="Text_20_body">místo současného:</text:p>
      <text:p text:style-name="P3">from {{ ref('raw_supplies') }}</text:p>
      <text:h text:style-name="Heading_20_2" text:outline-level="2">Poznámka k vašemu Debezium projektu</text:h>
      <text:p text:style-name="Text_20_body">Ve vašem konkrétním repozitáři Debezium podle konfigurace kopíruje tabulky <text:span text:style-name="T1">bronze_*</text:span> ze zdrojové PostgreSQL do cílové PostgreSQL. To znamená, že v tomto workflow je bronze zároveň publikovanou výstupní vrstvou pro CDC:</text:p>
      <text:p text:style-name="P3">dbt seed<text:line-break/> <text:s text:c="3"/>-&gt; raw_*<text:line-break/> <text:s text:c="3"/>-&gt; dbt bronze_*<text:line-break/> <text:s text:c="3"/>-&gt; Debezium<text:line-break/> <text:s text:c="3"/>-&gt; Kafka<text:line-break/> <text:s text:c="3"/>-&gt; cílová PostgreSQL</text:p>
      <text:p text:style-name="Text_20_body">To není špatně. Znamená to pouze, že bronze zde není surový vstup, ale již typovaná a připravená vrstva určená k přenosu.</text:p>
      <text:p text:style-name="Text_20_body">Nejdůležitější pravidlo je:</text:p>
      <text:p text:style-name="Quotations">Raw je vstupní vrstva, bronze je první transformační vrstva. Raw nemusí být dbt model, ale v produkčním řešení je obvykle vhodné ji zachovat.</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1T23:51:38.627948317</meta:creation-date>
    <dc:date>2026-07-12T00:16:52.910804945</dc:date>
    <meta:editing-duration>PT5M42S</meta:editing-duration>
    <meta:editing-cycles>2</meta:editing-cycles>
    <meta:generator>LibreOffice/26.2.3.2$Linux_X86_64 LibreOffice_project/620$Build-2</meta:generator>
    <meta:document-statistic meta:table-count="2" meta:image-count="0" meta:object-count="0" meta:page-count="12" meta:paragraph-count="253" meta:word-count="2215" meta:character-count="14884" meta:non-whitespace-character-count="12588"/>
  </office:meta>
</office:document-meta>
</file>